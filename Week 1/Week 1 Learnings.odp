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1000002A4D1C1BECF.png" manifest:media-type="image/png"/>
  <manifest:file-entry manifest:full-path="Pictures/100000000000035C00000192E65AB767.png" manifest:media-type="image/png"/>
  <manifest:file-entry manifest:full-path="Pictures/10000000000004000000016F8C953C53.png" manifest:media-type="image/png"/>
  <manifest:file-entry manifest:full-path="Pictures/1000000000000300000001B0102E74F4.png" manifest:media-type="image/png"/>
  <manifest:file-entry manifest:full-path="Pictures/100000000000035C00000218D302CD80.png" manifest:media-type="image/png"/>
  <manifest:file-entry manifest:full-path="Pictures/100000000000035C000001AE68EA73B3.png" manifest:media-type="image/png"/>
  <manifest:file-entry manifest:full-path="Pictures/1000000000000320000001905E589FF8.png" manifest:media-type="image/png"/>
  <manifest:file-entry manifest:full-path="Pictures/100000010000035C000002F0E2BC0E86.png" manifest:media-type="image/png"/>
  <manifest:file-entry manifest:full-path="Pictures/100000000000023F000002E2A57607E6.png" manifest:media-type="image/png"/>
  <manifest:file-entry manifest:full-path="Pictures/10000001000006330000039378244590.png" manifest:media-type="image/png"/>
  <manifest:file-entry manifest:full-path="Pictures/100000000000035C0000029318A12F46.png" manifest:media-type="image/png"/>
  <manifest:file-entry manifest:full-path="Pictures/100000000000078000000438AA638A1D.jpg" manifest:media-type="image/jpeg"/>
  <manifest:file-entry manifest:full-path="Pictures/100000010000050000000020EFA501EF.png" manifest:media-type="image/png"/>
  <manifest:file-entry manifest:full-path="Pictures/1000000000000780000004386765EBC4.jpg" manifest:media-type="image/jpeg"/>
  <manifest:file-entry manifest:full-path="Pictures/100000010000016A0000029381BE7C06.png" manifest:media-type="image/png"/>
  <manifest:file-entry manifest:full-path="Pictures/1000000100000020000002D03251752C.png" manifest:media-type="image/png"/>
  <manifest:file-entry manifest:full-path="Pictures/10000C8F0000034200004A6A1EBF6087.svg" manifest:media-type="image/svg+xml"/>
  <manifest:file-entry manifest:full-path="Pictures/10000CA90000844B000003429459CB15.svg" manifest:media-type="image/svg+xml"/>
  <manifest:file-entry manifest:full-path="Pictures/10000C1C0000034200004A6AE9C37B9A.svg" manifest:media-type="image/svg+xml"/>
  <manifest:file-entry manifest:full-path="Pictures/1000000000000294000001368731606B.png" manifest:media-type="image/png"/>
  <manifest:file-entry manifest:full-path="Pictures/10000C340000844B000003421C8EBBF6.svg" manifest:media-type="image/svg+xml"/>
  <manifest:file-entry manifest:full-path="Pictures/10000001000005000000002028E58B51.png" manifest:media-type="image/png"/>
  <manifest:file-entry manifest:full-path="Pictures/10000000000000AE000000A03C3924DD.png" manifest:media-type="image/png"/>
  <manifest:file-entry manifest:full-path="Pictures/10000001000001F300000354A4683E4E.png" manifest:media-type="image/png"/>
  <manifest:file-entry manifest:full-path="Pictures/1000000100000020000002D02B1489AA.png" manifest:media-type="image/png"/>
  <manifest:file-entry manifest:full-path="Pictures/10000001000001F000000351433544DC.png" manifest:media-type="image/png"/>
  <manifest:file-entry manifest:full-path="Pictures/10000001000001F10000029352A51C9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9.451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0.721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1.81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1.941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7.06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3.606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0.803cm)" draw:image-opacity="100%" style:mirror="none" loext:decorative="false"/>
    </style:style>
    <style:style style:name="gr12" style:family="graphic" style:parent-style-name="standard">
      <style:graphic-properties draw:stroke="none" draw:fill="none" fo:min-height="9.221cm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10.118cm" fo:min-width="14.22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4cm" loext:decorative="false"/>
      <style:paragraph-properties style:writing-mode="lr-tb"/>
    </style:style>
    <style:style style:name="pr2" style:family="presentation" style:parent-style-name="Right_20_Bar_20_Blu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Right_20_Bar_20_Whit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eft_20_Bar_20_Blue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Leaf_20_Blue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End_20_Slid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 fo:text-shadow="none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cm" fo:line-height="100%" fo:text-align="start" style:writing-mode="lr-tb"/>
      <style:text-properties fo:color="#62cf51" loext:opacity="100%" style:font-name="Noto Sans" fo:font-size="48pt" style:font-size-asian="48pt" style:font-size-complex="4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" fo:font-size="48pt" style:font-size-asian="48pt" style:font-size-complex="48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24pt" style:font-size-asian="24pt" style:font-size-complex="24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24pt" style:font-size-asian="24pt" style:font-size-complex="24pt"/>
    </style:style>
    <style:style style:name="P13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5" style:family="paragraph">
      <style:paragraph-properties fo:margin-top="0cm" fo:margin-bottom="0cm" fo:line-height="100%" fo:text-align="center" style:writing-mode="lr-tb"/>
      <style:text-properties fo:color="#ffffff" loext:opacity="100%" style:font-name="Noto Sans" fo:font-size="40pt" fo:font-weight="normal" style:font-size-asian="40pt" style:font-weight-asian="normal" style:font-size-complex="40pt" style:font-weight-complex="normal"/>
    </style:style>
    <style:style style:name="P1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" fo:font-size="40pt" fo:font-weight="normal" style:font-size-asian="40pt" style:font-weight-asian="normal" style:font-size-complex="40pt" style:font-weight-complex="normal"/>
    </style:style>
    <style:style style:name="P17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style:font-size-asian="34pt" style:font-size-complex="34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34pt" style:font-size-asian="34pt" style:font-size-complex="34pt"/>
    </style:style>
    <style:style style:name="P1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 fo:text-align="start"/>
      <style:text-properties fo:font-size="14pt" style:font-size-asian="14pt" style:font-size-complex="14pt"/>
    </style:style>
    <style:style style:name="P21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22" style:family="paragraph">
      <style:paragraph-properties fo:margin-top="0.42cm" fo:margin-bottom="0.35cm" fo:line-height="100%" fo:text-align="start" style:writing-mode="lr-tb"/>
      <style:text-properties fo:color="#0393e4" loext:opacity="100%" fo:font-size="10pt" style:font-size-asian="10pt" style:font-size-complex="10pt"/>
    </style:style>
    <style:style style:name="P2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margin-top="0.42cm" fo:margin-bottom="0.35cm" fo:line-height="100%" fo:text-align="start" style:writing-mode="lr-tb" style:font-independent-line-spacing="true"/>
      <style:text-properties fo:color="#0393e4" loext:opacity="100%" style:font-name="Noto Sans" fo:font-size="10pt" style:font-size-asian="10pt" style:font-size-complex="10pt"/>
    </style:style>
    <style:style style:name="P25" style:family="paragraph">
      <loext:graphic-properties draw:fill="none"/>
      <style:paragraph-properties fo:margin-top="0.42cm" fo:margin-bottom="0.35cm" fo:text-align="start"/>
      <style:text-properties fo:font-size="14pt" style:font-size-asian="10pt" style:font-size-complex="10pt"/>
    </style:style>
    <style:style style:name="P26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27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margin-top="0.42cm" fo:margin-bottom="0.35cm" fo:line-height="100%" fo:text-align="start" style:writing-mode="lr-tb"/>
      <style:text-properties fo:color="#ffffff" loext:opacity="100%" fo:font-size="10pt" style:font-size-asian="10pt" style:font-size-complex="10pt"/>
    </style:style>
    <style:style style:name="P30" style:family="paragraph">
      <loext:graphic-properties draw:fill="none"/>
      <style:paragraph-properties fo:margin-top="0.42cm" fo:margin-bottom="0.35cm" fo:line-height="100%" fo:text-align="start" style:writing-mode="lr-tb" style:font-independent-line-spacing="true"/>
      <style:text-properties fo:color="#ffffff" loext:opacity="100%" style:font-name="Noto Sans" fo:font-size="10pt" style:font-size-asian="10pt" style:font-size-complex="10pt"/>
    </style:style>
    <style:style style:name="P31" style:family="paragraph">
      <style:paragraph-properties fo:margin-top="0cm" fo:margin-bottom="0cm" fo:line-height="100%" fo:text-align="center" style:writing-mode="lr-tb"/>
      <style:text-properties style:font-name="Noto Sans" fo:font-size="18pt"/>
    </style:style>
    <style:style style:name="P3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62cf51" loext:opacity="100%" style:text-line-through-style="none" style:text-line-through-type="none" style:text-position="0% 100%" style:font-name="Noto San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0pt" style:font-size-complex="10pt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2" draw:layer="layout" svg:width="17.68cm" svg:height="3.975cm" svg:x="0.735cm" svg:y="4.915cm">
          <text:p text:style-name="P1"><text:span text:style-name="T1">HPE CPP </text:span></text:p>
          <text:p text:style-name="P1"><text:span text:style-name="T1">Week 1 Learn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Right_20_Bar_20_Blue">
        <office:forms form:automatic-focus="false" form:apply-design-mode="false"/>
        <draw:custom-shape draw:name="TextShape 2" draw:style-name="gr1" draw:text-style-name="P5" draw:layer="layout" svg:width="16.51cm" svg:height="2.113cm" svg:x="9.525cm" svg:y="1.697cm">
          <text:p text:style-name="P4"><text:span text:style-name="T1">Last M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draw:style-name="gr4" draw:text-style-name="P7" draw:layer="layout" svg:width="17.145cm" svg:height="9.885cm" svg:x="9.525cm" svg:y="4.445cm">
          <draw:image xlink:href="Pictures/1000000100000633000003937824459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Right_20_Bar_20_White">
        <office:forms form:automatic-focus="false" form:apply-design-mode="false"/>
        <draw:custom-shape draw:name="TextShape 2" draw:style-name="gr1" draw:text-style-name="P10" draw:layer="layout" svg:width="2.631cm" svg:height="2.281cm" svg:x="9.144cm" svg:y="3.81cm">
          <text:p text:style-name="P9"><text:span text:style-name="T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265cm" svg:x="11.938cm" svg:y="4.445cm">
          <text:p text:style-name="P11"><text:span text:style-name="T3">SCSI &amp; LUN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2.631cm" svg:height="2.281cm" svg:x="9.144cm" svg:y="5.593cm">
          <text:p text:style-name="P9"><text:span text:style-name="T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265cm" svg:x="11.811cm" svg:y="9.724cm">
          <text:p text:style-name="P11"><text:span text:style-name="T3">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2.631cm" svg:height="2.281cm" svg:x="9.144cm" svg:y="7.443cm">
          <text:p text:style-name="P9"><text:span text:style-name="T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265cm" svg:x="11.811cm" svg:y="6.178cm">
          <text:p text:style-name="P11"><text:span text:style-name="T3">Types of 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2.631cm" svg:height="2.281cm" svg:x="9.18cm" svg:y="9.226cm">
          <text:p text:style-name="P9"><text:span text:style-name="T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265cm" svg:x="11.811cm" svg:y="7.874cm">
          <text:p text:style-name="P11"><text:span text:style-name="T3">File Systems &amp; PE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8.604cm" svg:height="1.69cm" svg:x="9.398cm" svg:y="1.624cm">
          <text:p text:style-name="P13"><text:span text:style-name="T4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draw:custom-shape draw:name="TextShape 3" draw:style-name="gr1" draw:text-style-name="P10" draw:layer="layout" svg:width="2.631cm" svg:height="2.283cm" svg:x="9.18cm" svg:y="11.054cm">
          <text:p text:style-name="P9"><text:span text:style-name="T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12" draw:layer="layout" svg:width="12.954cm" svg:height="1.267cm" svg:x="11.835cm" svg:y="11.577cm">
          <text:p text:style-name="P11"><text:span text:style-name="T3">Areas to Expl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eft_20_Bar_20_Blue" presentation:presentation-page-layout-name="AL2T1">
        <office:forms form:automatic-focus="false" form:apply-design-mode="false"/>
        <draw:custom-shape draw:name="TextShape 2_2" draw:style-name="gr1" draw:text-style-name="P16" draw:layer="layout" svg:width="28.002cm" svg:height="1.942cm" svg:x="0cm" svg:y="7.2cm">
          <text:p text:style-name="P15"><text:span text:style-name="T5">01- SCSI &amp; LU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Right_20_Bar_20_White" presentation:presentation-page-layout-name="AL2T1">
        <office:forms form:automatic-focus="false" form:apply-design-mode="false"/>
        <draw:custom-shape draw:name="TextShape 2_36" draw:style-name="gr1" draw:text-style-name="P18" draw:layer="layout" svg:width="28.002cm" svg:height="1.69cm" svg:x="0.573cm" svg:y="1.27cm">
          <text:p text:style-name="P17"><text:span text:style-name="T4">01 - SCSI (Small Computer System Interfac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3.998cm" svg:height="8.836cm" svg:x="1.242cm" svg:y="4.445cm">
          <draw:image xlink:href="Pictures/1000000000000294000001368731606B.png" xlink:type="simple" xlink:show="embed" xlink:actuate="onLoad" draw:mime-type="image/png">
            <text:p/>
          </draw:image>
        </draw:frame>
        <draw:frame draw:style-name="gr5" draw:text-style-name="P20" draw:layer="layout" svg:width="11.43cm" svg:height="10.785cm" svg:x="15.827cm" svg:y="3.589cm">
          <draw:text-box>
            <text:p text:style-name="P19"><text:span text:style-name="T6">SCSI is a command protocol for block devices. </text:span><text:span text:style-name="T6"><text:line-break/></text:span><text:span text:style-name="T6">The SCSI layer standardizes disk commands inside the OS. Storage drivers implement those commands over their specific transport.</text:span><text:span text:style-name="T6"><text:line-break/></text:span><text:span text:style-name="T6"><text:line-break/></text:span><text:span text:style-name="T6">It defines commands like:</text:span><text:span text:style-name="T6"><text:line-break/></text:span><text:span text:style-name="T6"><text:tab/></text:span><text:span text:style-name="T6">- READ</text:span><text:span text:style-name="T6"><text:line-break/></text:span><text:span text:style-name="T6"><text:tab/></text:span><text:span text:style-name="T6">- WRITE</text:span><text:span text:style-name="T6"><text:line-break/></text:span><text:span text:style-name="T6"><text:tab/></text:span><text:span text:style-name="T6">- INQUIRY</text:span><text:span text:style-name="T6"><text:line-break/></text:span><text:span text:style-name="T6"><text:tab/></text:span><text:span text:style-name="T6">- TEST UNIT READY</text:span></text:p>
            <text:p text:style-name="P19"><text:span text:style-name="T6">In SCSI architecture, </text:span><text:span text:style-name="T6"><text:line-break/></text:span><text:span text:style-name="T6">a target can expose multiple logical units.</text:span><text:span text:style-name="T6"><text:line-break/></text:span><text:span text:style-name="T6">Each logical unit is identified by a number.</text:span><text:span text:style-name="T6"><text:line-break/></text:span><text:span text:style-name="T6">That number is the Logical Unit Number LUN.</text:span><text:span text:style-name="T6"><text:line-break/></text:span><text:span text:style-name="T6">A LUN is an address inside a SCSI target.</text:span></text:p>
            <text:p text:style-name="P19"/>
            <text:p text:style-name="P19"><text:span text:style-name="T6"/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Right_20_Bar_20_White" presentation:presentation-page-layout-name="AL2T1">
        <office:forms form:automatic-focus="false" form:apply-design-mode="false"/>
        <draw:custom-shape draw:name="TextShape 2_ 1" draw:style-name="gr1" draw:text-style-name="P18" draw:layer="layout" svg:width="28.002cm" svg:height="1.69cm" svg:x="0.573cm" svg:y="1.27cm">
          <text:p text:style-name="P17"><text:span text:style-name="T4">LUN ( Logical Unit Numb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0" draw:layer="layout" svg:width="14.605cm" svg:height="11.501cm" svg:x="12.065cm" svg:y="3.634cm">
          <draw:text-box>
            <text:p text:style-name="P21"><text:span text:style-name="T6">A LUN is an address inside a SCSI target.</text:span><text:span text:style-name="T6"><text:line-break/></text:span><text:span text:style-name="T6"><text:tab/></text:span><text:span text:style-name="T6">- Not a disk.</text:span><text:span text:style-name="T6"><text:line-break/></text:span><text:span text:style-name="T6"><text:tab/></text:span><text:span text:style-name="T6">- Not storage itself.</text:span><text:span text:style-name="T6"><text:line-break/></text:span><text:span text:style-name="T6"><text:tab/></text:span><text:span text:style-name="T6">- An identifier.</text:span></text:p>
            <text:p text:style-name="P21"><text:span text:style-name="T6">Imagine an iSCSI target server and has physical disk. </text:span><text:span text:style-name="T6"><text:line-break/></text:span><text:span text:style-name="T6">It carves this storage into logical units</text:span></text:p>
            <text:p text:style-name="P21"><text:span text:style-name="T6">Target:</text:span><text:span text:style-name="T6"><text:line-break/></text:span><text:span text:style-name="T6">iqn.2026-02.com.company:storage</text:span><text:span text:style-name="T6"><text:line-break/></text:span><text:span text:style-name="T6">LUN 0 → 100GB</text:span><text:span text:style-name="T6"><text:line-break/></text:span><text:span text:style-name="T6">LUN 1 → 50GB </text:span><text:span text:style-name="T6"><text:line-break/></text:span><text:span text:style-name="T6">LUN 2 → 200GB </text:span><text:span text:style-name="T6"><text:line-break/></text:span><text:span text:style-name="T6">Each LUN behaves like an independent disk.</text:span></text:p>
            <text:p text:style-name="P21"><text:span text:style-name="T6">The initiator logs in and sees:</text:span><text:span text:style-name="T6"><text:line-break/></text:span><text:span text:style-name="T6">/dev/sda</text:span><text:span text:style-name="T6"><text:line-break/></text:span><text:span text:style-name="T6">/dev/sdb</text:span><text:span text:style-name="T6"><text:line-break/></text:span><text:span text:style-name="T6">/dev/sdc</text:span><text:span text:style-name="T6"><text:line-break/></text:span><text:span text:style-name="T6">But those correspond to LUN 0, 1, 2.</text:span><text:span text:style-name="T6"><text:line-break/></text:span><text:span text:style-name="T6">That mapping happens at the SCSI layer.</text:span></text:p>
          </draw:text-box>
        </draw:frame>
        <draw:frame draw:style-name="gr4" draw:text-style-name="P7" draw:layer="layout" svg:width="9.307cm" svg:height="11.945cm" draw:transform="skewX (0.000174532925199433) rotate (-0.002792526803191) translate (1.488cm 3.269cm)">
          <draw:image xlink:href="Pictures/100000000000023F000002E2A57607E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Right_20_Bar_20_White" presentation:presentation-page-layout-name="AL2T1">
        <office:forms form:automatic-focus="false" form:apply-design-mode="false"/>
        <draw:custom-shape draw:name="TextShape 2_ 2" draw:style-name="gr1" draw:text-style-name="P18" draw:layer="layout" svg:width="28.002cm" svg:height="1.69cm" svg:x="0.573cm" svg:y="1.27cm">
          <text:p text:style-name="P17"><text:span text:style-name="T4">LUN ( Logical Unit Number) Cont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0" draw:layer="layout" svg:width="14.605cm" svg:height="10.971cm" svg:x="12.065cm" svg:y="3.634cm">
          <draw:text-box>
            <text:p text:style-name="P21"><text:span text:style-name="T6">1. LUN ≠ Partition</text:span><text:span text:style-name="T6"><text:line-break/></text:span><text:span text:style-name="T6"><text:tab/></text:span><text:span text:style-name="T6">A LUN is like an entire disk.</text:span><text:span text:style-name="T6"><text:line-break/></text:span><text:span text:style-name="T6"><text:tab/></text:span></text:p>
            <text:p text:style-name="P21"><text:span text:style-name="T6">2. LUN ≠ Physical Disk</text:span><text:span text:style-name="T6"><text:line-break/></text:span><text:span text:style-name="T6"><text:tab/></text:span><text:span text:style-name="T6">One disk can host multiple LUNs.</text:span><text:span text:style-name="T6"><text:line-break/></text:span><text:span text:style-name="T6"><text:tab/></text:span><text:span text:style-name="T6">Multiple disks can back one LUN.</text:span><text:span text:style-name="T6"><text:line-break/></text:span><text:span text:style-name="T6"><text:tab/></text:span><text:span text:style-name="T6">LUN is abstraction.</text:span></text:p>
            <text:p text:style-name="P21"><text:span text:style-name="T6">3. LUN Addressing</text:span><text:span text:style-name="T6"><text:line-break/></text:span><text:span text:style-name="T6"><text:tab/></text:span><text:span text:style-name="T6">In simple systems:</text:span><text:span text:style-name="T6"><text:line-break/></text:span><text:span text:style-name="T6"><text:tab/></text:span><text:span text:style-name="T6"><text:tab/></text:span><text:span text:style-name="T6">LUN = small integer (0, 1, 2…)</text:span><text:span text:style-name="T6"><text:line-break/></text:span><text:span text:style-name="T6"><text:tab/></text:span><text:span text:style-name="T6">In enterprise SCSI:</text:span><text:span text:style-name="T6"><text:line-break/></text:span><text:span text:style-name="T6"><text:tab/></text:span><text:span text:style-name="T6"><text:tab/></text:span><text:span text:style-name="T6">LUNs are 64-bit values.</text:span><text:span text:style-name="T6"><text:line-break/></text:span><text:span text:style-name="T6"><text:tab/></text:span><text:span text:style-name="T6"><text:tab/></text:span><text:span text:style-name="T6">They can encode complex addressing.</text:span></text:p>
            <text:p text:style-name="P19"><text:span text:style-name="T6">Because LUN is block-level the client OS thinks it owns the disk.</text:span><text:span text:style-name="T6"><text:line-break/></text:span><text:span text:style-name="T6"/></text:p>
          </draw:text-box>
        </draw:frame>
        <draw:frame draw:style-name="gr4" draw:text-style-name="P7" draw:layer="layout" svg:width="9.307cm" svg:height="11.945cm" draw:transform="skewX (0.000174532925199433) rotate (-0.002792526803191) translate (1.488cm 3.269cm)">
          <draw:image xlink:href="Pictures/100000000000023F000002E2A57607E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Right_20_Bar_20_White" presentation:presentation-page-layout-name="AL2T1">
        <office:forms form:automatic-focus="false" form:apply-design-mode="false"/>
        <draw:custom-shape draw:name="TextShape 2_ 3" draw:style-name="gr1" draw:text-style-name="P18" draw:layer="layout" svg:width="28.002cm" svg:height="1.69cm" svg:x="0.573cm" svg:y="1.27cm">
          <text:p text:style-name="P17"><text:span text:style-name="T4">LUN ( Logical Unit Number) Cont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0" draw:layer="layout" svg:width="16.51cm" svg:height="12.065cm" svg:x="10.795cm" svg:y="3.175cm">
          <draw:text-box>
            <text:p text:style-name="P21"><text:span text:style-name="T6">Provisioning Types</text:span><text:span text:style-name="T6"><text:line-break/></text:span><text:span text:style-name="T6"><text:tab/></text:span><text:span text:style-name="T6">- Thin provisioning:</text:span><text:span text:style-name="T6"><text:line-break/></text:span><text:span text:style-name="T6"><text:tab/></text:span><text:span text:style-name="T6"><text:tab/></text:span><text:span text:style-name="T6">LUN claims to be 100GB.</text:span><text:span text:style-name="T6"><text:line-break/></text:span><text:span text:style-name="T6"><text:tab/></text:span><text:span text:style-name="T6"><text:tab/></text:span><text:span text:style-name="T6">Actually only consumes storage as data is written.</text:span><text:span text:style-name="T6"><text:line-break/></text:span><text:span text:style-name="T6"><text:tab/></text:span><text:span text:style-name="T6">- Thick provisioning:</text:span><text:span text:style-name="T6"><text:line-break/></text:span><text:span text:style-name="T6"><text:tab/></text:span><text:span text:style-name="T6"><text:tab/></text:span><text:span text:style-name="T6">Full space reserved upfront.</text:span><text:span text:style-name="T6"><text:line-break/></text:span><text:span text:style-name="T6"><text:tab/></text:span><text:span text:style-name="T6"><text:tab/></text:span><text:span text:style-name="T6">Thin provisioning saves space.</text:span></text:p>
            <text:p text:style-name="P21"><text:span text:style-name="T7">Backstore: </text:span><text:span text:style-name="T7"><text:line-break/></text:span><text:span text:style-name="T7"><text:tab/></text:span><text:span text:style-name="T7">The backstore defines where the actual data lives.</text:span><text:span text:style-name="T7"><text:line-break/></text:span><text:span text:style-name="T7"><text:tab/></text:span><text:span text:style-name="T7">LUN is created from a backstore.</text:span><text:span text:style-name="T7"><text:line-break/></text:span><text:span text:style-name="T7"><text:tab/></text:span><text:span text:style-name="T6">The LUN does not contain data.The backstore does.</text:span><text:span text:style-name="T6"><text:line-break/></text:span><text:span text:style-name="T6"><text:tab/></text:span><text:span text:style-name="T6">The LUN is just a pointer to a backstore.</text:span><text:span text:style-name="T6"><text:line-break/></text:span><text:span text:style-name="T6"><text:tab/></text:span><text:span text:style-name="T6">Several types of backstore: fileio, block, memory-backend, pscsi</text:span></text:p>
            <text:p text:style-name="P21"><text:span text:style-name="T6">In LIO(Linux I/O), steps are conceptually:</text:span><text:span text:style-name="T6"><text:line-break/></text:span><text:span text:style-name="T6"><text:tab/></text:span><text:span text:style-name="T6">1. Create backstore</text:span><text:span text:style-name="T6"><text:line-break/></text:span><text:span text:style-name="T6"><text:tab/></text:span><text:span text:style-name="T6">2. Create target (IQN) </text:span><text:span text:style-name="T6"><text:line-break/></text:span><text:span text:style-name="T6"><text:tab/></text:span><text:span text:style-name="T6">3. Create LUN mapping</text:span><text:span text:style-name="T6"><text:line-break/></text:span><text:span text:style-name="T6"><text:tab/></text:span><text:span text:style-name="T6">4. Allow initiator access</text:span></text:p>
          </draw:text-box>
        </draw:frame>
        <draw:frame draw:style-name="gr4" draw:text-style-name="P7" draw:layer="layout" svg:width="8.558cm" svg:height="10.795cm" svg:x="0.635cm" svg:y="3.81cm">
          <draw:image xlink:href="Pictures/100000010000035C000002F0E2BC0E8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Right_20_Bar_20_White" presentation:presentation-page-layout-name="AL2T1">
        <office:forms form:automatic-focus="false" form:apply-design-mode="false"/>
        <draw:custom-shape draw:name="TextShape 2_ 4" draw:style-name="gr1" draw:text-style-name="P18" draw:layer="layout" svg:width="28.002cm" svg:height="1.69cm" svg:x="0.573cm" svg:y="1.27cm">
          <text:p text:style-name="P17"><text:span text:style-name="T4">SBPS ( Scalable Boot Content Proje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0" draw:layer="layout" svg:width="16.51cm" svg:height="12.191cm" svg:x="10.795cm" svg:y="3.175cm">
          <draw:text-box>
            <text:p text:style-name="P21"><text:span text:style-name="T6">In SBPS (Scalable Boot Content Projection):</text:span><text:span text:style-name="T6"><text:line-break/></text:span><text:span text:style-name="T6">Each node may receive:</text:span><text:span text:style-name="T6"><text:line-break/></text:span><text:span text:style-name="T6"><text:tab/></text:span><text:span text:style-name="T6">- Its own LUN</text:span><text:span text:style-name="T6"><text:line-break/></text:span><text:span text:style-name="T6"><text:tab/></text:span><text:span text:style-name="T6">OR</text:span><text:span text:style-name="T6"><text:line-break/></text:span><text:span text:style-name="T6"><text:tab/></text:span><text:span text:style-name="T6">- A shared read-only LUN</text:span><text:span text:style-name="T6"><text:line-break/></text:span><text:span text:style-name="T6">That LUN contains rootfs.</text:span></text:p>
            <text:p text:style-name="P21"><text:span text:style-name="T6">Boot Flow:</text:span><text:span text:style-name="T6"><text:line-break/></text:span><text:span text:style-name="T6"><text:tab/></text:span><text:span text:style-name="T6">1. S3 </text:span><text:span text:style-name="T6"><text:line-break/></text:span><text:span text:style-name="T6"><text:tab/></text:span><text:span text:style-name="T6">2. s3fs</text:span><text:span text:style-name="T6"><text:line-break/></text:span><text:span text:style-name="T6"><text:tab/></text:span><text:span text:style-name="T6">3. Backstore</text:span><text:span text:style-name="T6"><text:line-break/></text:span><text:span text:style-name="T6"><text:tab/></text:span><text:span text:style-name="T6">4. LUN</text:span><text:span text:style-name="T6"><text:line-break/></text:span><text:span text:style-name="T6"><text:tab/></text:span><text:span text:style-name="T6">5. ISCSI Target </text:span><text:span text:style-name="T6"><text:line-break/></text:span><text:span text:style-name="T6">Client side</text:span><text:span text:style-name="T6"><text:line-break/></text:span><text:span text:style-name="T6"><text:tab/></text:span><text:span text:style-name="T6">6. PXE </text:span><text:span text:style-name="T6"><text:line-break/></text:span><text:span text:style-name="T6"><text:tab/></text:span><text:span text:style-name="T6">7. DHCP + TFTP</text:span><text:span text:style-name="T6"><text:line-break/></text:span><text:span text:style-name="T6"><text:tab/></text:span><text:span text:style-name="T6">8. Kernel + iSCSI Login</text:span><text:span text:style-name="T6"><text:line-break/></text:span><text:span text:style-name="T6"><text:tab/></text:span><text:span text:style-name="T6">9. LUN appears as /dev/sdx</text:span><text:span text:style-name="T6"><text:line-break/></text:span><text:span text:style-name="T6"><text:tab/></text:span><text:span text:style-name="T6">10. Mount rootfs</text:span><text:span text:style-name="T6"><text:line-break/></text:span><text:span text:style-name="T6"><text:tab/></text:span><text:span text:style-name="T6">11. boots</text:span></text:p>
            <text:p text:style-name="P21"><text:span text:style-name="T6"/></text:p>
          </draw:text-box>
        </draw:frame>
        <draw:frame draw:style-name="gr4" draw:text-style-name="P7" draw:layer="layout" svg:width="8.558cm" svg:height="10.795cm" svg:x="0.635cm" svg:y="3.81cm">
          <draw:image xlink:href="Pictures/100000010000035C000002F0E2BC0E8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eft_20_Bar_20_Blue" presentation:presentation-page-layout-name="AL2T1">
        <office:forms form:automatic-focus="false" form:apply-design-mode="false"/>
        <draw:custom-shape draw:name="TextShape 2_ 5" draw:style-name="gr1" draw:text-style-name="P16" draw:layer="layout" svg:width="28.002cm" svg:height="1.942cm" svg:x="0cm" svg:y="7.2cm">
          <text:p text:style-name="P15"><text:span text:style-name="T5">02- Types of Boo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Right_20_Bar_20_White" presentation:presentation-page-layout-name="AL2T1">
        <office:forms form:automatic-focus="false" form:apply-design-mode="false"/>
        <draw:custom-shape draw:name="TextShape 2_ 6" draw:style-name="gr1" draw:text-style-name="P18" draw:layer="layout" svg:width="28.002cm" svg:height="1.69cm" svg:x="0.573cm" svg:y="1.27cm">
          <text:p text:style-name="P17"><text:span text:style-name="T4">What is Boot 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14.605cm" svg:height="12.191cm" svg:x="12.7cm" svg:y="3.175cm">
          <draw:text-box>
            <text:p text:style-name="P19"><text:span text:style-name="T6">Booting is the process of loading an operating system into memory and transferring control to it.</text:span></text:p>
            <text:p text:style-name="P19"><text:span text:style-name="T6">Minimal abstract sequence:</text:span></text:p>
            <text:p text:style-name="P19"><text:span text:style-name="T6"><text:tab/></text:span><text:span text:style-name="T6">1. Firmware runs (BIOS or UEFI)</text:span></text:p>
            <text:p text:style-name="P19"><text:span text:style-name="T6"><text:tab/></text:span><text:span text:style-name="T6">2. Bootloader loads kernel</text:span></text:p>
            <text:p text:style-name="P19"><text:span text:style-name="T6"><text:tab/></text:span><text:span text:style-name="T6">3. Kernel initializes hardware</text:span></text:p>
            <text:p text:style-name="P19"><text:span text:style-name="T6"><text:tab/></text:span><text:span text:style-name="T6">4. Kernel mounts root filesystem</text:span></text:p>
            <text:p text:style-name="P19"><text:span text:style-name="T6"><text:tab/></text:span><text:span text:style-name="T6">5. init system starts services</text:span></text:p>
            <text:p text:style-name="P19"><text:span text:style-name="T6">Every type of boot changes where steps 2 and 4 get their data from.</text:span></text:p>
          </draw:text-box>
        </draw:frame>
        <draw:frame draw:style-name="gr4" draw:text-style-name="P7" draw:layer="layout" svg:width="10.795cm" svg:height="10.521cm" svg:x="0.635cm" svg:y="3.449cm">
          <draw:image xlink:href="Pictures/100000000000035C0000029318A12F4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Right_20_Bar_20_White" presentation:presentation-page-layout-name="AL2T1">
        <office:forms form:automatic-focus="false" form:apply-design-mode="false"/>
        <draw:custom-shape draw:name="TextShape 2_ 7" draw:style-name="gr1" draw:text-style-name="P18" draw:layer="layout" svg:width="28.002cm" svg:height="1.69cm" svg:x="0.573cm" svg:y="1.27cm">
          <text:p text:style-name="P17"><text:span text:style-name="T4">Local Boo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14.605cm" svg:height="12.191cm" svg:x="12.7cm" svg:y="3.175cm">
          <draw:text-box>
            <text:p text:style-name="P21"><text:span text:style-name="T6"/></text:p>
            <text:p text:style-name="P21"><text:span text:style-name="T6">Boot Procedure:</text:span><text:span text:style-name="T6"><text:line-break/></text:span><text:span text:style-name="T6"><text:tab/></text:span><text:span text:style-name="T6">1. Firmware</text:span><text:span text:style-name="T6"><text:line-break/></text:span><text:span text:style-name="T6"><text:tab/></text:span><text:span text:style-name="T6">2. Bootloader (from local disk)</text:span><text:span text:style-name="T6"><text:line-break/></text:span><text:span text:style-name="T6"><text:tab/></text:span><text:span text:style-name="T6">3. Kernel (from local disk)</text:span><text:span text:style-name="T6"><text:line-break/></text:span><text:span text:style-name="T6"><text:tab/></text:span><text:span text:style-name="T6">4. rootfs (local disk)</text:span></text:p>
            <text:p text:style-name="P21"><text:span text:style-name="T6">Everything comes from a locally attached storage device.</text:span><text:span text:style-name="T6"><text:line-break/></text:span><text:span text:style-name="T6">No network dependency.</text:span><text:span text:style-name="T6"><text:line-break/></text:span><text:span text:style-name="T6">Simple and Fast.</text:span><text:span text:style-name="T6"><text:line-break/></text:span><text:span text:style-name="T6">Not scalable for data centers.</text:span></text:p>
            <text:p text:style-name="P21"><text:span text:style-name="T6"/></text:p>
          </draw:text-box>
        </draw:frame>
        <draw:frame draw:style-name="gr4" draw:text-style-name="P7" draw:layer="layout" svg:width="10.795cm" svg:height="10.521cm" svg:x="0.635cm" svg:y="3.449cm">
          <draw:image xlink:href="Pictures/100000000000035C0000029318A12F4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Right_20_Bar_20_White" presentation:presentation-page-layout-name="AL2T1">
        <office:forms form:automatic-focus="false" form:apply-design-mode="false"/>
        <draw:custom-shape draw:name="TextShape 2_ 8" draw:style-name="gr1" draw:text-style-name="P18" draw:layer="layout" svg:width="28.002cm" svg:height="1.69cm" svg:x="0.573cm" svg:y="1.27cm">
          <text:p text:style-name="P22"><text:span text:style-name="T4">Network Boo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3" draw:layer="layout" svg:width="13.97cm" svg:height="12.191cm" svg:x="13.335cm" svg:y="3.175cm">
          <draw:text-box>
            <text:p text:style-name="P19"><text:span text:style-name="T6">The OS or bootloader is loaded over the network instead of local storage.</text:span></text:p>
            <text:p text:style-name="P19"><text:span text:style-name="T6">It’s a category, not a specific protocol.</text:span></text:p>
            <text:p text:style-name="P19"><text:span text:style-name="T6">Examples:</text:span></text:p>
            <text:p text:style-name="P19"><text:span text:style-name="T6"><text:tab/></text:span><text:span text:style-name="T6">- PXE boot</text:span><text:span text:style-name="T6"><text:line-break/></text:span><text:span text:style-name="T6"><text:tab/></text:span><text:span text:style-name="T6">- iSCSI firmware boot</text:span></text:p>
            <text:p text:style-name="P19"><text:span text:style-name="T6">Network boot modifies the early stages of boot.</text:span><text:span text:style-name="T6"><text:line-break/></text:span><text:span text:style-name="T6">Instead of reading disk sectors locally, firmware contacts a server.</text:span></text:p>
            <text:p text:style-name="P19"><text:span text:style-name="T6"/></text:p>
          </draw:text-box>
        </draw:frame>
        <draw:frame draw:style-name="gr4" draw:text-style-name="P7" draw:layer="layout" svg:width="11.43cm" svg:height="8.466cm" svg:x="0.635cm" svg:y="3.599cm">
          <draw:image xlink:href="Pictures/100000000000035C00000218D302CD8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Right_20_Bar_20_White" presentation:presentation-page-layout-name="AL2T1">
        <office:forms form:automatic-focus="false" form:apply-design-mode="false"/>
        <draw:custom-shape draw:name="TextShape 2_ 9" draw:style-name="gr1" draw:text-style-name="P24" draw:layer="layout" svg:width="28.002cm" svg:height="1.69cm" svg:x="0.573cm" svg:y="1.27cm">
          <text:p text:style-name="P22"><text:span text:style-name="T4">PXE Boot (Preboot Execution Environme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13.97cm" svg:height="12.191cm" svg:x="13.335cm" svg:y="3.175cm">
          <draw:text-box>
            <text:p text:style-name="P21"><text:span text:style-name="T6">PXE is the most common implementation of network boot.</text:span><text:span text:style-name="T6"><text:line-break/></text:span><text:span text:style-name="T6">It operates at firmware level.</text:span></text:p>
            <text:p text:style-name="P21"><text:span text:style-name="T6">Flow:</text:span><text:span text:style-name="T6"><text:line-break/></text:span><text:span text:style-name="T6"><text:tab/></text:span><text:span text:style-name="T6">1. Machine powers on.</text:span><text:span text:style-name="T6"><text:line-break/></text:span><text:span text:style-name="T6"><text:tab/></text:span><text:span text:style-name="T6">2. BIOS/UEFI checks boot order.</text:span><text:span text:style-name="T6"><text:line-break/></text:span><text:span text:style-name="T6"><text:tab/></text:span><text:span text:style-name="T6">3. PXE option is selected.</text:span><text:span text:style-name="T6"><text:line-break/></text:span><text:span text:style-name="T6"><text:tab/></text:span><text:span text:style-name="T6">4. NIC firmware broadcasts DHCP request.</text:span><text:span text:style-name="T6"><text:line-break/></text:span><text:span text:style-name="T6"><text:tab/></text:span><text:span text:style-name="T6">5. DHCP server responds with:</text:span><text:span text:style-name="T6"><text:line-break/></text:span><text:span text:style-name="T6"><text:tab/></text:span><text:span text:style-name="T6"><text:tab/></text:span><text:span text:style-name="T6">- IP address</text:span><text:span text:style-name="T6"><text:line-break/></text:span><text:span text:style-name="T6"><text:tab/></text:span><text:span text:style-name="T6"><text:tab/></text:span><text:span text:style-name="T6">- TFTP server location</text:span><text:span text:style-name="T6"><text:line-break/></text:span><text:span text:style-name="T6"><text:tab/></text:span><text:span text:style-name="T6"><text:tab/></text:span><text:span text:style-name="T6">- Boot file name</text:span><text:span text:style-name="T6"><text:line-break/></text:span><text:span text:style-name="T6"><text:tab/></text:span><text:span text:style-name="T6">6. Client downloads bootloader via TFTP.</text:span><text:span text:style-name="T6"><text:line-break/></text:span><text:span text:style-name="T6"><text:tab/></text:span><text:span text:style-name="T6">7. Bootloader loads kernel + initramfs.</text:span><text:span text:style-name="T6"><text:line-break/></text:span><text:span text:style-name="T6"><text:tab/></text:span><text:span text:style-name="T6">8. Control transfers to Linux kernel.</text:span></text:p>
            <text:p text:style-name="P21"><text:span text:style-name="T6"><text:line-break/></text:span><text:span text:style-name="T6">PXE only gets you to the kernel stage.</text:span><text:span text:style-name="T6"><text:line-break/></text:span><text:span text:style-name="T6">It does not provide persistent storage.</text:span><text:span text:style-name="T6"><text:line-break/></text:span><text:span text:style-name="T6">After kernel loads, you still need a root filesystem.</text:span><text:span text:style-name="T6"><text:line-break/></text:span><text:span text:style-name="T6">That’s where NFS or iSCSI enters.</text:span></text:p>
          </draw:text-box>
        </draw:frame>
        <draw:frame draw:style-name="gr4" draw:text-style-name="P7" draw:layer="layout" svg:width="11.43cm" svg:height="8.466cm" svg:x="0.635cm" svg:y="3.599cm">
          <draw:image xlink:href="Pictures/100000000000035C00000218D302CD8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Right_20_Bar_20_White" presentation:presentation-page-layout-name="AL2T1">
        <office:forms form:automatic-focus="false" form:apply-design-mode="false"/>
        <draw:custom-shape draw:name="TextShape 2_ 10" draw:style-name="gr1" draw:text-style-name="P24" draw:layer="layout" svg:width="28.002cm" svg:height="1.69cm" svg:x="0.573cm" svg:y="1.27cm">
          <text:p text:style-name="P22"><text:span text:style-name="T4">NFS Boot (Network File Syste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13.97cm" svg:height="12.191cm" svg:x="13.335cm" svg:y="3.175cm">
          <draw:text-box>
            <text:p text:style-name="P21"><text:span text:style-name="T6">NFS boot is file-level network boot.</text:span></text:p>
            <text:p text:style-name="P21"><text:span text:style-name="T6">Flow:</text:span><text:span text:style-name="T6"><text:line-break/></text:span><text:span text:style-name="T6"><text:tab/></text:span><text:span text:style-name="T6">1. Firmware </text:span><text:span text:style-name="T6"><text:line-break/></text:span><text:span text:style-name="T6"><text:tab/></text:span><text:span text:style-name="T6">2. PXE </text:span><text:span text:style-name="T6"><text:line-break/></text:span><text:span text:style-name="T6"><text:tab/></text:span><text:span text:style-name="T6">3. kernel + initramfs</text:span></text:p>
            <text:p text:style-name="P21"><text:span text:style-name="T6">Kernel mounts rootfs over NFS</text:span><text:span text:style-name="T6"><text:line-break/></text:span><text:span text:style-name="T6">Instead of block device, the root filesystem is accessed as a remote directory.</text:span></text:p>
            <text:p text:style-name="P21"><text:span text:style-name="T6">So root (/) is actually: nfs://server/rootfs</text:span></text:p>
            <text:p text:style-name="P21"><text:span text:style-name="T6">Advantages: Simple, Easy to share across many clients,</text:span><text:span text:style-name="T6"><text:line-break/></text:span><text:span text:style-name="T6">No per-node disk required</text:span></text:p>
            <text:p text:style-name="P21"><text:span text:style-name="T6">Disadvantages: File-level protocol, Network latency impacts, <text:s/>filesystem operations, Requires reliable network</text:span></text:p>
          </draw:text-box>
        </draw:frame>
        <draw:frame draw:style-name="gr4" draw:text-style-name="P7" draw:layer="layout" svg:width="11.43cm" svg:height="11.546cm" svg:x="0.635cm" svg:y="3.176cm">
          <draw:image xlink:href="Pictures/1000000000000300000001B0102E74F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Right_20_Bar_20_White" presentation:presentation-page-layout-name="AL2T1">
        <office:forms form:automatic-focus="false" form:apply-design-mode="false"/>
        <draw:custom-shape draw:name="TextShape 2_ 11" draw:style-name="gr1" draw:text-style-name="P24" draw:layer="layout" svg:width="28.002cm" svg:height="1.69cm" svg:x="0.573cm" svg:y="1.27cm">
          <text:p text:style-name="P22"><text:span text:style-name="T4">ISCSI Boot (Block Level Network Boo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3" draw:layer="layout" svg:width="13.97cm" svg:height="7.311cm" svg:x="13.335cm" svg:y="5.286cm">
          <draw:text-box>
            <text:p text:style-name="P19"><text:span text:style-name="T6">Instead of mounting files via NFS, </text:span><text:span text:style-name="T6"><text:line-break/></text:span><text:span text:style-name="T6">the client mounts a block device via iSCSI.</text:span></text:p>
            <text:p text:style-name="P19"><text:span text:style-name="T6">Flow: Firmware → PXE → kernel + initramfs</text:span></text:p>
            <text:p text:style-name="P19"><text:span text:style-name="T6"><text:tab/></text:span><text:span text:style-name="T6">- initramfs logs into iSCSI target</text:span><text:span text:style-name="T6"><text:line-break/></text:span><text:span text:style-name="T6"><text:tab/></text:span><text:span text:style-name="T6">- LUN appears as /dev/sdX</text:span><text:span text:style-name="T6"><text:line-break/></text:span><text:span text:style-name="T6"><text:tab/></text:span><text:span text:style-name="T6">- Kernel mounts /dev/sdX as root</text:span><text:span text:style-name="T6"><text:line-break/></text:span><text:span text:style-name="T6">Difference from NFS:</text:span><text:span text:style-name="T6"><text:line-break/></text:span><text:span text:style-name="T6"><text:tab/></text:span><text:span text:style-name="T6">- NFS = remote files</text:span><text:span text:style-name="T6"><text:line-break/></text:span><text:span text:style-name="T6"><text:tab/></text:span><text:span text:style-name="T6">- iSCSI = remote disk</text:span><text:span text:style-name="T6"><text:line-break/></text:span><text:span text:style-name="T6">OS thinks it owns a local disk.</text:span></text:p>
          </draw:text-box>
        </draw:frame>
        <draw:frame draw:style-name="gr4" draw:text-style-name="P7" draw:layer="layout" svg:width="11.43cm" svg:height="9.885cm" svg:x="0.635cm" svg:y="3.81cm">
          <draw:image xlink:href="Pictures/1000000100000633000003937824459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eft_20_Bar_20_Blue" presentation:presentation-page-layout-name="AL2T1">
        <office:forms form:automatic-focus="false" form:apply-design-mode="false"/>
        <draw:custom-shape draw:name="TextShape 2_ 12" draw:style-name="gr1" draw:text-style-name="P16" draw:layer="layout" svg:width="28.002cm" svg:height="1.942cm" svg:x="0cm" svg:y="7.2cm">
          <text:p text:style-name="P15"><text:span text:style-name="T5">03 – File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Right_20_Bar_20_White" presentation:presentation-page-layout-name="AL2T1">
        <office:forms form:automatic-focus="false" form:apply-design-mode="false"/>
        <draw:custom-shape draw:name="TextShape 2_ 13" draw:style-name="gr1" draw:text-style-name="P24" draw:layer="layout" svg:width="28.002cm" svg:height="1.69cm" svg:x="0.573cm" svg:y="1.27cm">
          <text:p text:style-name="P22"><text:span text:style-name="T4">What is a File System 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5" draw:layer="layout" svg:width="13.97cm" svg:height="12.191cm" svg:x="13.335cm" svg:y="3.175cm">
          <draw:text-box>
            <text:p text:style-name="P19"><text:span text:style-name="T8">A filesystem is a data structure and set of rules that organizes bytes on a storage medium into files and directories.</text:span></text:p>
            <text:p text:style-name="P19"><text:span text:style-name="T8">A disk without a filesystem is just a block device - a sequence of numbered blocks.</text:span></text:p>
            <text:p text:style-name="P19"><text:span text:style-name="T8">The filesystem provides:</text:span></text:p>
            <text:p text:style-name="P19"><text:span text:style-name="T8"><text:tab/></text:span><text:span text:style-name="T8">- Metadata (file owner info, permissions, timestamps)</text:span><text:span text:style-name="T8"><text:line-break/></text:span><text:span text:style-name="T8"><text:tab/></text:span><text:span text:style-name="T8">- Directory structure</text:span><text:span text:style-name="T8"><text:line-break/></text:span><text:span text:style-name="T8"><text:tab/></text:span><text:span text:style-name="T8">- Mapping from file → <text:s/>physical blocks</text:span><text:span text:style-name="T8"><text:line-break/></text:span><text:span text:style-name="T8"><text:tab/></text:span><text:span text:style-name="T8">- Journaling or consistency mechanisms (optional)</text:span></text:p>
            <text:p text:style-name="P19"><text:span text:style-name="T8">Examples: ext4, xfs, btrfs, ntfs, fat32</text:span></text:p>
            <text:p text:style-name="P19"><text:span text:style-name="T8">Block device ≠ filesystem</text:span><text:span text:style-name="T8"><text:line-break/></text:span><text:span text:style-name="T8">Filesystem lives on a block device.</text:span></text:p>
            <text:p text:style-name="P19"><text:span text:style-name="T8">In iSCSI: LUN → appears as block device → you format it → filesystem exists inside it.</text:span></text:p>
          </draw:text-box>
        </draw:frame>
        <draw:frame draw:style-name="gr4" draw:text-style-name="P7" draw:layer="layout" svg:width="12.385cm" svg:height="10.582cm" svg:x="0.635cm" svg:y="3.388cm">
          <draw:image xlink:href="Pictures/1000000000000320000001905E589FF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Right_20_Bar_20_White" presentation:presentation-page-layout-name="AL2T1">
        <office:forms form:automatic-focus="false" form:apply-design-mode="false"/>
        <draw:custom-shape draw:name="TextShape 2_ 14" draw:style-name="gr1" draw:text-style-name="P24" draw:layer="layout" svg:width="28.002cm" svg:height="1.69cm" svg:x="0.573cm" svg:y="1.27cm">
          <text:p text:style-name="P22"><text:span text:style-name="T4">Rootfs ( Root File System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13.97cm" svg:height="12.191cm" svg:x="13.335cm" svg:y="3.175cm">
          <draw:text-box>
            <text:p text:style-name="P21"><text:span text:style-name="T6">rootfs is simply the filesystem mounted at /.</text:span><text:span text:style-name="T6"><text:line-break/></text:span><text:span text:style-name="T6">It contains: /bin, /lib, /etc, /usr, /var, /sbin, etc.</text:span><text:span text:style-name="T6"><text:line-break/></text:span><text:span text:style-name="T6">It is the operating system.</text:span></text:p>
            <text:p text:style-name="P21"><text:span text:style-name="T6">When we say “booting an OS”, we really mean:</text:span><text:span text:style-name="T6"><text:line-break/></text:span><text:span text:style-name="T6"><text:tab/></text:span><text:span text:style-name="T6">1. Mount rootfs</text:span><text:span text:style-name="T6"><text:line-break/></text:span><text:span text:style-name="T6"><text:tab/></text:span><text:span text:style-name="T6">2. Execute /sbin/init (or systemd)</text:span><text:span text:style-name="T6"><text:line-break/></text:span><text:span text:style-name="T6"><text:tab/></text:span><text:span text:style-name="T6">3. Everything else is preparation.</text:span></text:p>
            <text:p text:style-name="P21"><text:span text:style-name="T6">During early boot:</text:span><text:span text:style-name="T6"><text:line-break/></text:span><text:span text:style-name="T6"><text:tab/></text:span><text:span text:style-name="T6">- initramfs is temporary rootfs.</text:span><text:span text:style-name="T6"><text:line-break/></text:span><text:span text:style-name="T6"><text:tab/></text:span><text:span text:style-name="T6">- Then kernel switches to real rootfs.</text:span><text:span text:style-name="T6"><text:line-break/></text:span><text:span text:style-name="T6"><text:tab/></text:span><text:span text:style-name="T6">- Then init process starts.</text:span></text:p>
            <text:p text:style-name="P21"><text:span text:style-name="T6">So rootfs is not a special filesystem type.</text:span><text:span text:style-name="T6"><text:line-break/></text:span><text:span text:style-name="T6">It is a role.</text:span><text:span text:style-name="T6"><text:line-break/></text:span><text:span text:style-name="T6">Any filesystem can be rootfs:</text:span><text:span text:style-name="T6"><text:line-break/></text:span><text:span text:style-name="T6"><text:tab/></text:span><text:span text:style-name="T6">- ext4 on local disk</text:span><text:span text:style-name="T6"><text:line-break/></text:span><text:span text:style-name="T6"><text:tab/></text:span><text:span text:style-name="T6">- NFS mount</text:span><text:span text:style-name="T6"><text:line-break/></text:span><text:span text:style-name="T6"><text:tab/></text:span><text:span text:style-name="T6">- iSCSI LUN</text:span></text:p>
          </draw:text-box>
        </draw:frame>
        <draw:frame draw:style-name="gr4" draw:text-style-name="P7" draw:layer="layout" svg:width="11.51cm" svg:height="10.582cm" svg:x="1.27cm" svg:y="3.388cm">
          <draw:image xlink:href="Pictures/10000000000000AE000000A03C3924D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Right_20_Bar_20_White" presentation:presentation-page-layout-name="AL2T1">
        <office:forms form:automatic-focus="false" form:apply-design-mode="false"/>
        <draw:custom-shape draw:name="TextShape 2_ 15" draw:style-name="gr1" draw:text-style-name="P24" draw:layer="layout" svg:width="28.002cm" svg:height="1.69cm" svg:x="0.621cm" svg:y="0.931cm">
          <text:p text:style-name="P22"><text:span text:style-name="T4">s3fs ( Simple Storage Service(S3) File System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3" draw:layer="layout" svg:width="13.97cm" svg:height="13.856cm" svg:x="13.482cm" svg:y="2.811cm">
          <draw:text-box>
            <text:p text:style-name="P19"><text:span text:style-name="T6">s3fs is a FUSE-based filesystem that mounts an S3 bucket as a local filesystem. It does NOT provide block storage.</text:span><text:span text:style-name="T6"><text:line-break/></text:span><text:span text:style-name="T6">It provides object storage mapped to file semantics.</text:span><text:span text:style-name="T6"><text:line-break/></text:span><text:span text:style-name="T6">S3 is:</text:span><text:span text:style-name="T6"><text:line-break/></text:span><text:span text:style-name="T6"><text:tab/></text:span><text:span text:style-name="T6">- Object storage.</text:span><text:span text:style-name="T6"><text:line-break/></text:span><text:span text:style-name="T6"><text:tab/></text:span><text:span text:style-name="T6">- Not block.</text:span><text:span text:style-name="T6"><text:line-break/></text:span><text:span text:style-name="T6"><text:tab/></text:span><text:span text:style-name="T6">- Not POSIX-native.</text:span><text:span text:style-name="T6"><text:line-break/></text:span><text:span text:style-name="T6">s3fs translates open(), read(), write() into S3 API calls.</text:span><text:span text:style-name="T6"><text:line-break/></text:span><text:span text:style-name="T6"><text:line-break/></text:span><text:span text:style-name="T6">Limitations:</text:span><text:span text:style-name="T6"><text:line-break/></text:span><text:span text:style-name="T6"><text:tab/></text:span><text:span text:style-name="T6">- High latency</text:span><text:span text:style-name="T6"><text:line-break/></text:span><text:span text:style-name="T6"><text:tab/></text:span><text:span text:style-name="T6">- Not truly POSIX compliant</text:span><text:span text:style-name="T6"><text:line-break/></text:span><text:span text:style-name="T6"><text:tab/></text:span><text:span text:style-name="T6">- No real in-place modification (objects rewritten)</text:span><text:span text:style-name="T6"><text:line-break/></text:span><text:span text:style-name="T6"><text:tab/></text:span><text:span text:style-name="T6">-Performance depends heavily on caching</text:span><text:span text:style-name="T6"><text:line-break/></text:span><text:span text:style-name="T6">s3fs is good for: </text:span><text:span text:style-name="T6"><text:line-break/></text:span><text:span text:style-name="T6"><text:tab/></text:span><text:span text:style-name="T6">- Static assets</text:span><text:span text:style-name="T6"><text:line-break/></text:span><text:span text:style-name="T6"><text:tab/></text:span><text:span text:style-name="T6">- Logs</text:span><text:span text:style-name="T6"><text:line-break/></text:span><text:span text:style-name="T6"><text:tab/></text:span><text:span text:style-name="T6">- Backup access</text:span><text:span text:style-name="T6"><text:line-break/></text:span><text:span text:style-name="T6">It is bad for:</text:span><text:span text:style-name="T6"><text:line-break/></text:span><text:span text:style-name="T6"><text:tab/></text:span><text:span text:style-name="T6">- Databases</text:span><text:span text:style-name="T6"><text:line-break/></text:span><text:span text:style-name="T6"><text:tab/></text:span><text:span text:style-name="T6">- Root filesystem</text:span><text:span text:style-name="T6"><text:line-break/></text:span><text:span text:style-name="T6"><text:tab/></text:span><text:span text:style-name="T6">- High IOPS workloads</text:span></text:p>
            <text:p text:style-name="P26"><text:span text:style-name="T6"/></text:p>
          </draw:text-box>
        </draw:frame>
        <draw:frame draw:style-name="gr11" draw:text-style-name="P7" draw:layer="layout" svg:width="11.166cm" svg:height="11.021cm" svg:x="0.631cm" svg:y="3.422cm">
          <draw:image xlink:href="Pictures/10000000000004000000016F8C953C5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eft_20_Bar_20_Blue" presentation:presentation-page-layout-name="AL2T1">
        <office:forms form:automatic-focus="false" form:apply-design-mode="false"/>
        <draw:custom-shape draw:name="TextShape 2_ 17" draw:style-name="gr1" draw:text-style-name="P16" draw:layer="layout" svg:width="28.002cm" svg:height="1.942cm" svg:x="0cm" svg:y="7.2cm">
          <text:p text:style-name="P15"><text:span text:style-name="T5">04 –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Right_20_Bar_20_White" presentation:presentation-page-layout-name="AL2T1">
        <office:forms form:automatic-focus="false" form:apply-design-mode="false"/>
        <draw:custom-shape draw:name="TextShape 2_ 16" draw:style-name="gr1" draw:text-style-name="P24" draw:layer="layout" svg:width="28.002cm" svg:height="1.69cm" svg:x="0.621cm" svg:y="0.931cm">
          <text:p text:style-name="P22"><text:span text:style-name="T4">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3.97cm" svg:height="9.471cm" svg:x="13.288cm" svg:y="4.073cm">
          <draw:text-box>
            <text:p text:style-name="P21"><text:span text:style-name="T6">Kubernetes is a container orchestration platform. It automates deployment, scaling, networking, and lifecycle management of containerized applications.</text:span></text:p>
            <text:p text:style-name="P21"><text:span text:style-name="T6">It was created at Google and open-sourced in 2014. It’s now governed by the Cloud Native Computing Foundation (CNCF). </text:span></text:p>
            <text:p text:style-name="P21"><text:span text:style-name="T6">Containers are just isolated processes. </text:span><text:span text:style-name="T6"><text:line-break/></text:span><text:span text:style-name="T6">Docker made packaging easy. </text:span><text:span text:style-name="T6"><text:line-break/></text:span><text:span text:style-name="T6">But once you want to run 50 containers across 10 machines with failover, scaling, rolling updates, service discovery, health checks, and networking - manual management collapses.</text:span></text:p>
            <text:p text:style-name="P21"><text:span text:style-name="T6">Kubernetes solves that coordination problem.</text:span></text:p>
          </draw:text-box>
        </draw:frame>
        <draw:frame draw:style-name="gr4" draw:text-style-name="P7" draw:layer="layout" svg:width="12.153cm" svg:height="6.076cm" svg:x="0.687cm" svg:y="5.138cm">
          <draw:image xlink:href="Pictures/100000000000035C000001AE68EA73B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Right_20_Bar_20_White" presentation:presentation-page-layout-name="AL2T1">
        <office:forms form:automatic-focus="false" form:apply-design-mode="false"/>
        <draw:custom-shape draw:name="TextShape 2_ 18" draw:style-name="gr1" draw:text-style-name="P24" draw:layer="layout" svg:width="28.002cm" svg:height="1.69cm" svg:x="0.621cm" svg:y="0.931cm">
          <text:p text:style-name="P22"><text:span text:style-name="T4">Kubernetes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4.68cm" svg:height="11.536cm" svg:x="1.536cm" svg:y="3.227cm">
          <draw:image xlink:href="Pictures/100000000000035C00000192E65AB76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Right_20_Bar_20_White" presentation:presentation-page-layout-name="AL2T1">
        <office:forms form:automatic-focus="false" form:apply-design-mode="false"/>
        <draw:custom-shape draw:name="TextShape 2_ 19" draw:style-name="gr1" draw:text-style-name="P24" draw:layer="layout" svg:width="28.002cm" svg:height="1.69cm" svg:x="0.621cm" svg:y="0.931cm">
          <text:p text:style-name="P22"><text:span text:style-name="T4">Kubernetes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4.657cm" svg:height="12.246cm" svg:x="1.551cm" svg:y="3.034cm">
          <draw:image xlink:href="Pictures/1000000100000551000002A4D1C1BEC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eft_20_Bar_20_Blue" presentation:presentation-page-layout-name="AL2T1">
        <office:forms form:automatic-focus="false" form:apply-design-mode="false"/>
        <draw:custom-shape draw:name="TextShape 2_ 20" draw:style-name="gr1" draw:text-style-name="P16" draw:layer="layout" svg:width="28.002cm" svg:height="1.942cm" svg:x="0cm" svg:y="7.2cm">
          <text:p text:style-name="P15"><text:span text:style-name="T5">05 – Areas to Expl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eaf_20_Blue_20_1" presentation:presentation-page-layout-name="AL3T11">
        <office:forms form:automatic-focus="false" form:apply-design-mode="false"/>
        <draw:custom-shape draw:name="TextShape 1" draw:style-name="gr13" draw:text-style-name="P28" draw:layer="layout" svg:width="15.493cm" svg:height="1.357cm" svg:x="10.849cm" svg:y="1.675cm">
          <text:p text:style-name="P27"><text:span text:style-name="T9">Areas to Expl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30" draw:layer="layout" svg:width="14.223cm" svg:height="10.117cm" svg:x="10.849cm" svg:y="3.885cm">
          <text:p text:style-name="P29"><text:span text:style-name="T10">1. LIO Implementation</text:span></text:p>
          <text:p text:style-name="P29"><text:span text:style-name="T10">2. Backstore &amp; s3fs Implementation</text:span></text:p>
          <text:p text:style-name="P29"><text:span text:style-name="T10">3. S3 Bucket Integration</text:span></text:p>
          <text:p text:style-name="P29"><text:span text:style-name="T10">4. PXE + DHCP Setup</text:span></text:p>
          <text:p text:style-name="P29"><text:span text:style-name="T10">5. iSCSI Client &amp; Target Setup</text:span></text:p>
          <text:p text:style-name="P29"><text:span text:style-name="T10">6. initramfs &amp; iSCSI Root Boot Configuration</text:span></text:p>
          <text:p text:style-name="P29"><text:span text:style-name="T10">7. OS Image Creation &amp; Versioning Strategy</text:span></text:p>
          <text:p text:style-name="P29"><text:span text:style-name="T10">8. Metadata &amp; State Management Design</text:span></text:p>
          <text:p text:style-name="P29"><text:span text:style-name="T10">9. Failure Handling &amp; Recovery Scenarios</text:span></text:p>
          <text:p text:style-name="P29"><text:span text:style-name="T10">10. Observability &amp; Debugging Workflow</text:span></text:p>
          <text:p text:style-name="P2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End_20_Slide" presentation:presentation-page-layout-name="AL2T1">
        <office:forms form:automatic-focus="false" form:apply-design-mode="false"/>
        <draw:custom-shape draw:name="TextShape 1" draw:style-name="gr15" draw:text-style-name="P32" draw:layer="layout" svg:width="25.198cm" svg:height="2.114cm" svg:x="1.401cm" svg:y="6.146cm">
          <text:p text:style-name="P31"><text:span text:style-name="T11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Gradient_20_45" draw:display-name="Gradient 45" draw:style="linear" draw:start-color="#49de8f" draw:end-color="#41a671" draw:start-intensity="100%" draw:end-intensity="100%" draw:angle="30deg" draw:border="0%">
      <loext:gradient-stop svg:offset="0" loext:color-type="rgb" loext:color-value="#49de8f"/>
      <loext:gradient-stop svg:offset="1" loext:color-type="rgb" loext:color-value="#41a671"/>
    </draw:gradient>
    <draw:gradient draw:name="Gradient_20_7" draw:display-name="Gradient 7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Gradient_20_98" draw:display-name="Gradient 98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EFA501EF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28E58B51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8.834cm" svg:height="15.086cm" svg:x="-0.08cm" svg:y="0.001cm">
        <draw:image xlink:href="Pictures/10000001000001F300000354A4683E4E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4" draw:text-style-name="MP5" draw:layer="backgroundobjects" svg:width="8.834cm" svg:height="15.086cm" draw:transform="rotate (-3.14159265358979) translate (28.002cm 15.753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4" draw:text-style-name="MP5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4" draw:text-style-name="MP5" draw:layer="backgroundobjects" svg:width="8.754cm" svg:height="14.986cm" draw:transform="rotate (-3.14159265358979) translate (28.002cm 15.749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24.2.7.2$Linux_X86_64 LibreOffice_project/420$Build-2</meta:generator>
    <meta:creation-date>2026-02-25T09:12:46.153030863</meta:creation-date>
    <meta:editing-duration>PT4H12M44S</meta:editing-duration>
    <meta:editing-cycles>3</meta:editing-cycles>
    <dc:date>2026-02-25T18:06:22.647726206</dc:date>
    <meta:document-statistic meta:object-count="248"/>
  </office:meta>
</office:document-meta>
</file>